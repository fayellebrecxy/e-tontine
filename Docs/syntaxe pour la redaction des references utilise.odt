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85d" officeooo:paragraph-rsid="0010785d"/>
    </style:style>
    <style:style style:name="T1" style:family="text">
      <style:text-properties fo:font-variant="normal" fo:text-transform="none" fo:color="#222222" loext:opacity="100%" fo:font-family="Arial, Helvetica, sans-serif" fo:font-size="12pt" fo:letter-spacing="normal" fo:font-style="normal" fo:font-weight="normal"/>
    </style:style>
    <style:style style:name="T2" style:family="text">
      <style:text-properties fo:font-variant="normal" fo:text-transform="none" fo:color="#1155cc" loext:opacity="100%" fo:font-family="Arial, Helvetica, sans-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comment rediger les references :</text:p>
      <text:p text:style-name="P1"/>
      <text:p text:style-name="P1"><text:span text:style-name="T1">Pour les Reférences *Livre* (Book)</text:span><text:line-break/><text:span text:style-name="T1">Structure :</text:span><text:line-break/><text:span text:style-name="T1">[N°] Auteur(s), Titre du livre, Édition (si applicable). Lieu de publication : Éditeur, Année.</text:span><text:line-break/><text:line-break/><text:span text:style-name="T1">Exemple :</text:span><text:line-break/><text:span text:style-name="T1">[1] B. Kernighan and D. Ritchie, The C Programming Language, 2nd ed. Englewood Cliffs, NJ: Prentice Hall, 1988.</text:span><text:line-break/><text:line-break/><text:span text:style-name="T1">2. Si c'est un *Article de journal* (Journal Article)</text:span><text:line-break/><text:span text:style-name="T1">Structure :</text:span><text:line-break/><text:span text:style-name="T1">[N°] Auteur(s), "Titre de l'article," Nom du Journal, vol. numéro, no. numéro, pp. pages, Mois Année.</text:span><text:line-break/><text:line-break/><text:span text:style-name="T1">Exemple :</text:span><text:line-break/><text:span text:style-name="T1">[2] J. Doe and R. Smith, "Advanced quantum computing," IEEE Trans. Quantum Eng., vol. 5, no. 2, pp. 45–52, Jun. 2023.</text:span><text:line-break/><text:line-break/><text:span text:style-name="T1">3. Si c'est un *Article de conférence* (Conference Paper)</text:span><text:line-break/><text:span text:style-name="T1">Structure :</text:span><text:line-break/><text:span text:style-name="T1">[N°] Auteur(s), "Titre de l'article," in Nom de la Conférence, Lieu, Année, pp. pages.</text:span><text:line-break/><text:line-break/><text:span text:style-name="T1">Exemple :</text:span><text:line-break/><text:span text:style-name="T1">[3] A. Brown , "Machine learning for IoT security," in Proc. IEEE Int. Conf. Cybersecurity, Paris, France, 2022, pp. 112–119.</text:span><text:line-break/><text:line-break/><text:span text:style-name="T1">4. Si c'est une *Thèse ou un mémoire* (Thesis/Dissertation)</text:span><text:line-break/><text:span text:style-name="T1">Structure :</text:span><text:line-break/><text:span text:style-name="T1">[N°] Auteur, "Titre de la thèse," Type de thèse, Département, Université, Ville, Pays, Année.</text:span><text:line-break/><text:line-break/><text:span text:style-name="T1">Exemple :</text:span><text:line-break/><text:span text:style-name="T1">[4] M. Johnson, "Deep learning for autonomous vehicles," Ph.D. dissertation, Dept. Comput. Sci., Stanford Univ., Stanford, CA, USA, 2021.</text:span><text:line-break/><text:line-break/><text:span text:style-name="T1">5. si c'est un *Document en ligne* (Online Source)</text:span><text:line-break/><text:span text:style-name="T1">Structure :</text:span><text:line-break/><text:span text:style-name="T1">[N°] Auteur(s), "Titre," Source, Date de publication. [En ligne]. Disponible : URL. Date d’accès : JJ-Mmm-AAAA.</text:span><text:line-break/><text:line-break/><text:span text:style-name="T1">Exemple :</text:span><text:line-break/><text:span text:style-name="T1">[5] IEEE, "IEEE Citation Guidelines," 2023. [Online]. Available: </text:span><text:a xlink:type="simple" xlink:href="https://www.ieee.org/citations" office:target-frame-name="_blank" xlink:show="new" text:style-name="Internet_20_link" text:visited-style-name="Visited_20_Internet_20_Link"><text:span text:style-name="T2">https://www.ieee.org/citations</text:span></text:a><text:span text:style-name="T1">. Accessed: Jul. 2, 2023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09:47:49.860087913</meta:creation-date>
    <dc:date>2026-07-01T09:48:58.430902102</dc:date>
    <meta:editing-duration>PT1M10S</meta:editing-duration>
    <meta:editing-cycles>1</meta:editing-cycles>
    <meta:document-statistic meta:table-count="0" meta:image-count="0" meta:object-count="0" meta:page-count="1" meta:paragraph-count="2" meta:word-count="234" meta:character-count="1519" meta:non-whitespace-character-count="1280"/>
    <meta:generator>LibreOffice/26.2.4.2$Linux_X86_64 LibreOffice_project/3346a99e6b841765b75a9b29714a5b95c6761ce3</meta:generator>
  </office:meta>
</office:document-meta>
</file>